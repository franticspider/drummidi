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097273D306FEB6AE74E.png" manifest:media-type="image/png"/>
  <manifest:file-entry manifest:full-path="Pictures/10000000000001B8000000E110811FA921A975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0.9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105cm" fo:min-width="2.791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544cm" fo:min-width="1.382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077cm" fo:min-width="2.763cm" fo:padding-top="0.139cm" fo:padding-bottom="0.139cm" fo:padding-left="0.264cm" fo:padding-right="0.26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11.641cm" svg:height="5.952cm" svg:x="7.86cm" svg:y="2.595cm">
          <draw:image xlink:href="Pictures/10000000000001B8000000E110811FA921A97561.png" xlink:type="simple" xlink:show="embed" xlink:actuate="onLoad" draw:mime-type="image/png">
            <text:p/>
          </draw:image>
        </draw:frame>
        <draw:frame draw:style-name="gr1" draw:text-style-name="P2" draw:layer="layout" svg:width="22.489cm" svg:height="3.994cm" svg:x="3.382cm" svg:y="9.554cm">
          <draw:image xlink:href="Pictures/100000000000035200000097273D306FEB6AE74E.png" xlink:type="simple" xlink:show="embed" xlink:actuate="onLoad" draw:mime-type="image/png">
            <text:p/>
          </draw:image>
        </draw:frame>
        <draw:custom-shape draw:style-name="gr2" draw:text-style-name="P3" draw:layer="layout" svg:width="0.3cm" svg:height="0.3cm" svg:x="6.776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7.577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7.978cm" svg:y="12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8.379cm" svg:y="12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6.38cm" svg:y="12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5.581cm" svg:y="1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5.182cm" svg:y="1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9.577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0.378cm" svg:y="12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0.779cm" svg:y="12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1.18cm" svg:y="12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9.181cm" svg:y="1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2.377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3.178cm" svg:y="12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3.579cm" svg:y="12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3.98cm" svg:y="12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1.981cm" svg:y="1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5.077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5.878cm" svg:y="12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6.279cm" svg:y="12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6.68cm" svg:y="12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4.681cm" svg:y="1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7.978cm" svg:y="12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8.779cm" svg:y="12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9.18cm" svg:y="12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9.581cm" svg:y="1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7.582cm" svg:y="1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20.679cm" svg:y="12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21.48cm" svg:y="12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21.881cm" svg:y="1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22.282cm" svg:y="1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20.283cm" svg:y="12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23.481cm" svg:y="12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24.282cm" svg:y="1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24.683cm" svg:y="1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25.084cm" svg:y="12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23.085cm" svg:y="12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1.44cm" svg:height="0.645cm" svg:x="3.506cm" svg:y="14.864cm">
          <draw:text-box>
            <text:p><text:span text:style-name="T1">MIDI </text:span><text:span text:style-name="T1">NOT</text:span><text:span text:style-name="T1">ES: </text:span><text:span text:style-name="T1">21,23</text:span><text:span text:style-name="T1">,26,2</text:span><text:span text:style-name="T1">8,31,</text:span><text:span text:style-name="T1">33,35</text:span><text:span text:style-name="T1">,38,4</text:span><text:span text:style-name="T1">0,43,</text:span><text:span text:style-name="T1">45,47</text:span><text:span text:style-name="T1">,50,5</text:span><text:span text:style-name="T1">2,55,</text:span><text:span text:style-name="T1">57,59</text:span><text:span text:style-name="T1">,62,6</text:span><text:span text:style-name="T1">4,67,</text:span><text:span text:style-name="T1">69,71</text:span><text:span text:style-name="T1">,74,7</text:span><text:span text:style-name="T1">6,79,</text:span><text:span text:style-name="T1">81,83</text:span><text:span text:style-name="T1">,86,8</text:span><text:span text:style-name="T1">8,91,</text:span><text:span text:style-name="T1">93,95</text:span><text:span text:style-name="T1">,98,1</text:span><text:span text:style-name="T1">00,10</text:span><text:span text:style-name="T1">3,105</text:span><text:span text:style-name="T1">,107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andom pattern workflow</text:p>
          </draw:text-box>
        </draw:frame>
        <draw:custom-shape draw:style-name="gr5" draw:text-style-name="P7" xml:id="id1" draw:id="id1" draw:layer="layout" svg:width="3.291cm" svg:height="1.355cm" svg:x="12.814cm" svg:y="7.723cm">
          <text:p text:style-name="P6"><text:span text:style-name="T2">Generate new random patte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2" draw:id="id2" draw:layer="layout" svg:width="3.762cm" svg:height="1.586cm" svg:x="17.557cm" svg:y="7.637cm">
          <text:p text:style-name="P6"><text:span text:style-name="T3">Like i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draw:type="curve" svg:x1="16.105cm" svg:y1="8.4cm" svg:x2="17.557cm" svg:y2="8.43cm" draw:start-shape="id1" draw:start-glue-point="1" draw:end-shape="id2" draw:end-glue-point="5" svg:d="M16105 8400c1098 0 372 30 1452 30" svg:viewBox="0 0 1453 31">
          <text:p/>
        </draw:connector>
        <draw:connector draw:style-name="gr7" draw:text-style-name="P2" draw:layer="layout" draw:type="curve" svg:x1="19.438cm" svg:y1="9.223cm" svg:x2="14.459cm" svg:y2="9.078cm" draw:start-shape="id2" draw:start-glue-point="6" draw:end-shape="id1" draw:end-glue-point="2" svg:d="M19438 9223c0 751-4979 824-4979-145" svg:viewBox="0 0 4980 719">
          <text:p/>
        </draw:connector>
        <draw:custom-shape draw:style-name="gr8" draw:text-style-name="P7" xml:id="id3" draw:id="id3" draw:layer="layout" svg:width="3.291cm" svg:height="1.355cm" svg:x="7.207cm" svg:y="7.723cm">
          <text:p text:style-name="P6"><text:span text:style-name="T2">MIDI 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draw:type="curve" svg:x1="10.498cm" svg:y1="8.4cm" svg:x2="12.814cm" svg:y2="8.4cm" draw:start-shape="id3" draw:start-glue-point="1" draw:end-shape="id1" draw:end-glue-point="3" svg:d="M10498 8400h2316" svg:viewBox="0 0 2317 1">
          <text:p/>
        </draw:connector>
        <draw:custom-shape draw:style-name="gr8" draw:text-style-name="P7" xml:id="id4" draw:id="id4" draw:layer="layout" svg:width="3.291cm" svg:height="1.355cm" svg:x="22.714cm" svg:y="7.723cm">
          <text:p text:style-name="P6"><text:span text:style-name="T2">Store to EEPR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draw:type="curve" svg:x1="21.319cm" svg:y1="8.43cm" svg:x2="22.714cm" svg:y2="8.4cm" draw:start-shape="id2" draw:start-glue-point="7" draw:end-shape="id4" draw:end-glue-point="3" svg:d="M21319 8430c1036 0 339-30 1395-30" svg:viewBox="0 0 1396 31">
          <text:p/>
        </draw:connector>
        <draw:custom-shape draw:style-name="gr8" draw:text-style-name="P7" draw:layer="layout" svg:width="3.291cm" svg:height="1.355cm" svg:x="7.207cm" svg:y="10.923cm">
          <text:p text:style-name="P6"><text:span text:style-name="T2">SERIAL 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3.291cm" svg:height="1.355cm" svg:x="12.807cm" svg:y="10.923cm">
          <text:p text:style-name="P6"><text:span text:style-name="T2">print_serial</text:span></text:p>
          <text:p text:style-name="P6"><text:span text:style-name="T2">Stored pattern</text:span></text:p>
          <text:p text:style-name="P6"><text:span text:style-name="T2">From EEPR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3.291cm" svg:height="1.355cm" svg:x="1.316cm" svg:y="9.242cm">
          <text:p text:style-name="P6"><text:span text:style-name="T2">Boo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imon Hickinbotham</meta:initial-creator>
    <meta:creation-date>2025-03-22T23:06:53.025911758</meta:creation-date>
    <dc:date>2025-03-31T12:21:52.048537835</dc:date>
    <dc:creator>Simon Hickinbotham</dc:creator>
    <meta:editing-duration>P6DT2H11M12S</meta:editing-duration>
    <meta:editing-cycles>3</meta:editing-cycles>
    <meta:generator>LibreOffice/7.3.7.2$Linux_X86_64 LibreOffice_project/30$Build-2</meta:generator>
    <meta:document-statistic meta:object-count="78"/>
  </office:meta>
</office:document-meta>
</file>